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style:font-name="Liberation Serif" fo:font-size="12pt" officeooo:rsid="0012ab93" officeooo:paragraph-rsid="0012ab93" style:font-size-asian="12pt" style:font-size-complex="12pt"/>
    </style:style>
    <style:style style:name="P2" style:family="paragraph" style:parent-style-name="Standard">
      <style:paragraph-properties fo:line-height="115%"/>
      <style:text-properties style:font-name="Liberation Serif" fo:font-size="12pt" officeooo:rsid="000dd31c" officeooo:paragraph-rsid="000dd31c" style:font-size-asian="12pt" style:font-size-complex="12pt"/>
    </style:style>
    <style:style style:name="P3" style:family="paragraph" style:parent-style-name="Standard">
      <style:paragraph-properties fo:line-height="115%"/>
      <style:text-properties officeooo:rsid="000dd31c" officeooo:paragraph-rsid="000dd31c"/>
    </style:style>
    <style:style style:name="P4" style:family="paragraph" style:parent-style-name="Text_20_body">
      <style:paragraph-properties fo:line-height="115%"/>
      <style:text-properties officeooo:rsid="000dd31c" officeooo:paragraph-rsid="000dd31c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style:font-size-asian="12pt" style:font-size-complex="12pt" loext:padding="0cm" loext:border="none"/>
    </style:style>
    <style:style style:name="T3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4" style:family="text">
      <style:text-properties fo:font-variant="normal" fo:text-transform="none" fo:color="#0a0a0a" loext:opacity="100%" style:font-name="Liberation Serif" fo:font-size="12pt" fo:letter-spacing="normal" style:font-size-asian="12pt" style:font-size-complex="12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ubi Mohamed – Rayan chaouch</text:p>
      <text:p text:style-name="P2"/>
      <text:p text:style-name="P3"><text:span text:style-name="T1">Url site : </text:span><text:a xlink:type="simple" xlink:href="http://localhost/footstyle/Projet_site_vente_maillots/" text:style-name="Internet_20_link" text:visited-style-name="Visited_20_Internet_20_Link"><text:span text:style-name="Strong_20_Emphasis"><text:span text:style-name="Source_20_Text"><text:span text:style-name="T2">http://localhost/footstyle/Projet_site_vente_maillots/</text:span></text:span></text:span></text:a></text:p>
      <text:p text:style-name="P3"><text:span text:style-name="T1">Admin → </text:span><text:span text:style-name="Source_20_Text"><text:span text:style-name="T2">admin@footstyle.fr</text:span></text:span><text:span text:style-name="T1"> / </text:span><text:span text:style-name="Source_20_Text"><text:span text:style-name="T2">admin123</text:span></text:span></text:p>
      <text:p text:style-name="P4"><text:span text:style-name="Source_20_Text"><text:span text:style-name="T3">User → </text:span></text:span><text:span text:style-name="Source_20_Text"><text:span text:style-name="T2">jean@test.fr</text:span></text:span><text:span text:style-name="Source_20_Text"><text:span text:style-name="T4"> </text:span></text:span><text:span text:style-name="Source_20_Text"><text:span text:style-name="T3">/ </text:span></text:span><text:span text:style-name="Source_20_Text"><text:span text:style-name="T2">user123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22:06:31.500433000</meta:creation-date>
    <dc:date>2026-05-06T16:23:03.141290600</dc:date>
    <meta:editing-duration>PT31M14S</meta:editing-duration>
    <meta:editing-cycles>4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4" meta:word-count="18" meta:character-count="160" meta:non-whitespace-character-count="145"/>
  </office:meta>
</office:document-meta>
</file>